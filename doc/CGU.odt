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text-properties officeooo:paragraph-rsid="00082aee"/>
    </style:style>
    <style:style style:name="P3" style:family="paragraph" style:parent-style-name="Text_20_body" style:list-style-name="L22"/>
    <style:style style:name="P4" style:family="paragraph" style:parent-style-name="Text_20_body">
      <style:text-properties officeooo:paragraph-rsid="000848bd"/>
    </style:style>
    <style:style style:name="P5" style:family="paragraph" style:parent-style-name="Text_20_body">
      <style:text-properties officeooo:paragraph-rsid="0009631d"/>
    </style:style>
    <style:style style:name="P6" style:family="paragraph" style:parent-style-name="Text_20_body">
      <style:text-properties officeooo:rsid="000b2139" officeooo:paragraph-rsid="000b2139" fo:background-color="#ffff00"/>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text-properties officeooo:paragraph-rsid="0009631d"/>
    </style:style>
    <style:style style:name="P9" style:family="paragraph" style:parent-style-name="Text_20_body" style:list-style-name="L8">
      <style:paragraph-properties fo:margin-top="0cm" fo:margin-bottom="0cm" loext:contextual-spacing="false"/>
    </style:style>
    <style:style style:name="P10" style:family="paragraph" style:parent-style-name="Text_20_body" style:list-style-name="L21">
      <style:paragraph-properties fo:margin-top="0cm" fo:margin-bottom="0cm" loext:contextual-spacing="false"/>
    </style:style>
    <style:style style:name="P11" style:family="paragraph" style:parent-style-name="Text_20_body" style:list-style-name="L22">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text-properties officeooo:rsid="0009631d" officeooo:paragraph-rsid="0009631d"/>
    </style:style>
    <style:style style:name="T1" style:family="text">
      <style:text-properties officeooo:rsid="00082aee"/>
    </style:style>
    <style:style style:name="T2" style:family="text">
      <style:text-properties style:font-name="Liberation Serif" fo:font-size="24pt" fo:font-weight="bold" officeooo:rsid="00082aee" style:font-name-asian="Noto Serif CJK SC" style:font-size-asian="24pt" style:font-weight-asian="bold" style:font-name-complex="Lohit Devanagari" style:font-size-complex="24pt" style:font-weight-complex="bold"/>
    </style:style>
    <style:style style:name="T3" style:family="text">
      <style:text-properties style:font-name="Liberation Serif" fo:font-size="12pt" fo:font-weight="bold" officeooo:rsid="00082aee" style:font-name-asian="Noto Serif CJK SC" style:font-size-asian="12pt" style:font-weight-asian="bold" style:font-name-complex="Lohit Devanagari" style:font-size-complex="12pt" style:font-weight-complex="bold"/>
    </style:style>
    <style:style style:name="T4" style:family="text">
      <style:text-properties style:font-name="Liberation Serif" fo:font-size="12pt" fo:font-weight="bold" officeooo:rsid="000848bd" style:font-name-asian="Noto Serif CJK SC" style:font-size-asian="12pt" style:font-weight-asian="bold" style:font-name-complex="Lohit Devanagari" style:font-size-complex="12pt" style:font-weight-complex="bold"/>
    </style:style>
    <style:style style:name="T5" style:family="text">
      <style:text-properties fo:font-weight="bold" officeooo:rsid="00082aee" style:font-weight-asian="bold" style:font-weight-complex="bold"/>
    </style:style>
    <style:style style:name="T6" style:family="text">
      <style:text-properties fo:font-weight="bold" officeooo:rsid="000848bd" style:font-weight-asian="bold" style:font-weight-complex="bold"/>
    </style:style>
    <style:style style:name="T7" style:family="text">
      <style:text-properties fo:font-weight="bold" officeooo:rsid="000cc508" style:font-weight-asian="bold" style:font-weight-complex="bold"/>
    </style:style>
    <style:style style:name="T8" style:family="text">
      <style:text-properties officeooo:rsid="000848bd"/>
    </style:style>
    <style:style style:name="T9" style:family="text">
      <style:text-properties fo:background-color="#ffff00" loext:char-shading-value="0"/>
    </style:style>
    <style:style style:name="T10" style:family="text">
      <style:text-properties officeooo:rsid="0009631d"/>
    </style:style>
    <style:style style:name="T11" style:family="text">
      <style:text-properties officeooo:rsid="000b2139"/>
    </style:style>
    <style:style style:name="T12" style:family="text">
      <style:text-properties officeooo:rsid="000cc50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h text:style-name="Heading_20_1" text:outline-level="1"><text:bookmark text:name="eu"/>Conditions <text:span text:style-name="T2">Générales d’Utilisation</text:span></text:h>
      <text:p text:style-name="Text_20_body"><text:span text:style-name="Strong_20_Emphasis">Veuillez lire attentivement les présentes Conditions </text:span><text:span text:style-name="Strong_20_Emphasis"><text:span text:style-name="T1">Générales d’Utilisation</text:span></text:span><text:span text:style-name="Strong_20_Emphasis"> (« Conditions ») car elles contiennent des informations importantes concernant vos droits, obligations et recours légaux. En accédant à la Plateforme </text:span><text:span text:style-name="Strong_20_Emphasis"><text:span text:style-name="T5">Fishola</text:span></text:span><text:span text:style-name="Strong_20_Emphasis"> ou en l’utilisant, vous acceptez d’être lié par les présentes Conditions et de vous y conformer.</text:span></text:p>
      <text:p text:style-name="Text_20_body"><text:span text:style-name="Strong_20_Emphasis">Vous pouvez accéder à la plateforme en ligne de résolution des litiges de la Commission européenne ici : </text:span><text:a xlink:type="simple" xlink:href="http://ec.europa.eu/consumers/odr" text:style-name="Internet_20_link" text:visited-style-name="Visited_20_Internet_20_Link"><text:span text:style-name="Strong_20_Emphasis">http://ec.europa.eu/consumers/odr</text:span></text:a><text:span text:style-name="Strong_20_Emphasis">. Veuillez noter </text:span><text:span text:style-name="Strong_20_Emphasis"><text:span text:style-name="T1">que Fishola</text:span></text:span><text:span text:style-name="Strong_20_Emphasis"> n'est pas obligée et ne s'engage pas à utiliser un mode de résolution de litige alternatif pour résoudre tous litiges avec des consommateurs.</text:span></text:p>
      <text:p text:style-name="Text_20_body">Dernière mise à jour : <text:span text:style-name="T1">18 Mai 2020</text:span></text:p>
      <text:p text:style-name="Text_20_body">Merci d’utiliser <text:span text:style-name="T1">Fishola</text:span> !</text:p>
      <text:p text:style-name="P2">Les présentes Conditions constituent un accord juridiquement contraignant (le « Contrat ») qui vous lie à <text:span text:style-name="T1">Fishola</text:span> (tel que défini ci-dessous) et qui régit votre accès <text:span text:style-name="T1">aux applications</text:span> <text:span text:style-name="T1">Fishola </text:span>pour mobiles, tablettes et smartphones<text:span text:style-name="T1"> et </text:span>votre utilisation de <text:span text:style-name="T1">ces applications</text:span> (collectivement, <text:s/>les « <text:span text:style-name="Strong_20_Emphasis">Applications</text:span> »). </text:p>
      <text:p text:style-name="Text_20_body">Les termes « <text:span text:style-name="Strong_20_Emphasis"><text:span text:style-name="T5">Fishola</text:span></text:span> », « <text:span text:style-name="Strong_20_Emphasis">nous</text:span> », « <text:span text:style-name="Strong_20_Emphasis">notre</text:span> » ou « <text:span text:style-name="Strong_20_Emphasis">nos</text:span> » utilisés dans les présentes Conditions renvoient à <text:span text:style-name="T1">l’unité de recherche (UMR) CARRTEL de l’INRAE (Institut Nation de Recherche en Agriculture, Alimentation et Environnement) et de l’Université de Savoie Mont Blanc (USMB).</text:span></text:p>
      <text:p text:style-name="Text_20_body">La manière dont nous recueillons et utilisons des données à caractère personnel en lien avec votre accès à l’<text:span text:style-name="T1">Application et son utilisation est dans la </text:span><text:a xlink:type="simple" xlink:href="https://www.airbnb.fr/terms/privacy_policy" text:style-name="Internet_20_link" text:visited-style-name="Visited_20_Internet_20_Link">Charte de protection des données à caractère personnel</text:a>.</text:p>
      <text:h text:style-name="Heading_20_4" text:outline-level="4">1. Étendue des Services <text:span text:style-name="T3">Fishola</text:span></text:h>
      <text:p text:style-name="Text_20_body">1.1 La Plateforme <text:span text:style-name="T1">Fishola</text:span> permet aux utilisateurs enregistrés (les « <text:span text:style-name="Strong_20_Emphasis">Membres</text:span> ») <text:span text:style-name="T1">de renseigner des informations sur leurs prises lors de sessions de pêches. Ces informations seront exploitées par l’UMR CARRTEL </text:span><text:span text:style-name="T8">dans le cadre d’études statistiques ou à visées scientifiques.</text:span></text:p>
      <text:p text:style-name="Text_20_body">1.<text:span text:style-name="T8">2</text:span> <text:span text:style-name="T8">Fishola</text:span> n'est pas responsable en cas de pannes ou coupures d'Internet ou des infrastructures de télécommunications qui ne relèvent pas de notre contrôle et qui peuvent conduire à des interruptions de l'accessibilité de la plateforme</text:p>
      <text:h text:style-name="Heading_20_4" text:outline-level="4"><text:bookmark text:name="eusec201910_2"/>2. Admissibilité, Utilisation de la Plate-forme <text:span text:style-name="T4">Fishola</text:span>, Vérification des Membres</text:h>
      <text:p text:style-name="Text_20_body">2.1 Pour accéder à la Plateforme <text:span text:style-name="T8">Fishola</text:span> et l’utiliser, ou pour créer un Compte <text:span text:style-name="T8">Fishola</text:span>, vous devez être une personne physique <text:span text:style-name="T9">âgée d’au moins 18 ans </text:span></text:p>
      <text:p text:style-name="Text_20_body">2.<text:span text:style-name="T8">2</text:span> La vérification des utilisateurs sur Internet est difficile, et Airbnb ne peut confirmer l’identité d’un quelconque Membre avec certitude. </text:p>
      <text:p text:style-name="Text_20_body">2.<text:span text:style-name="T8">3 </text:span>En utilisant ou en téléchargeant l’Application à partir de l’App Store d’Apple, vous acceptez le <text:a xlink:type="simple" xlink:href="https://www.apple.com/legal/internet-services/itunes/ne/terms.html" text:style-name="Internet_20_link" text:visited-style-name="Visited_20_Internet_20_Link">Contrat de licence utilisateur final de l’Application sous licence d’Apple</text:a></text:p>
      <text:h text:style-name="Heading_20_4" text:outline-level="4"><text:bookmark text:name="eusec201910_3"/><text:soft-page-break/>3. Modification des présentes Conditions</text:h>
      <text:p text:style-name="Text_20_body"><text:span text:style-name="T8">Fishola</text:span> se réserve le droit de modifier à tout moment les présentes Conditions conformément au présent article. Si nous modifions les présentes Conditions, nous publierons les Conditions modifiées sur la Plate-forme en modifiant la date « Dernière mise à jour » figurant en haut des Conditions. Nous vous informerons également des modifications par e-mail dans un délai minimum de trente (30) jours avant la date de leur prise d’effet, et nous vous demanderons de nous faire part de votre acceptation des Conditions modifiées en cliquant à l'endroit prévu à cet effet. S</text:p>
      <text:h text:style-name="Heading_20_4" text:outline-level="4"><text:bookmark text:name="eusec201910_4"/>4. Création d’un compte</text:h>
      <text:p text:style-name="Text_20_body">4.1 Vous devez créer un compte (le « <text:span text:style-name="Strong_20_Emphasis">Compte </text:span><text:span text:style-name="Strong_20_Emphasis"><text:span text:style-name="T6">Fishola</text:span></text:span> ») pour pouvoir accéder à certaines fonctionnalités de la Plate-forme et les utiliser, telles que <text:span text:style-name="T8">créer une sortie</text:span>.</text:p>
      <text:p text:style-name="Text_20_body">4.2 Vous pouvez créer un Compte <text:span text:style-name="T8">Fishola</text:span> en choisissant une adresse e-mail et un mot de passe</text:p>
      <text:p text:style-name="Text_20_body">4.<text:span text:style-name="T8">3</text:span> Il vous appartient de préserver la confidentialité et la sécurité de vos identifiants de Compte <text:span text:style-name="T8">Fishola</text:span>, et il vous est interdit de divulguer vos identifiants à un quelconque tiers. Si vous pensez ou si vous avez lieu de croire que vos identifiants ont été perdus, volés, détournés ou compromis d’une quelconque manière, ou en cas d’utilisation non autorisée avérée ou présumée de votre Compte <text:span text:style-name="T8">Fishola</text:span>, vous devez n<text:span text:style-name="T8">ous en</text:span> informer immédiatement. Vous êtes responsable de toutes les activités menées avec votre Compte, sauf si vous n’avez pas autorisé ces activités et que vous n’avez pas fait preuve de négligence par ailleurs (par exemple, en ne signalant pas l’utilisation non autorisée ou la perte de vos identifiants).</text:p>
      <text:h text:style-name="Heading_20_4" text:outline-level="4"><text:bookmark text:name="eusec201910_5"/>5. Contenu</text:h>
      <text:p text:style-name="P4">5.1 <text:span text:style-name="T8">Fishola</text:span> peut permettre aux Membres de (i) créer, charger, publier, envoyer, recevoir ou stocker du contenu, tel que du texte, des photos, <text:span text:style-name="T8">ou des informations techniques sur les poissons</text:span> sur ou via la Plateforme <text:span text:style-name="T8">Fishola</text:span> (le « <text:span text:style-name="Strong_20_Emphasis">Contenu des Membres</text:span> »). <text:span text:style-name="T8">Ce contenu ne sera visible par aucun autre membre, et uniquement utilisé par les propriétaires de l’application pour effectuer des études statistiques ou à visées scientifiques</text:span></text:p>
      <text:p text:style-name="Text_20_body"><text:span text:style-name="T8">5</text:span>.<text:span text:style-name="T8">2</text:span> Sous réserve de votre respect des présentes Conditions, Airbnb vous octroie une licence limitée, non exclusive, non cessible, révocable, et ne pouvant faire l’objet d’une sous-licence pour télécharger et utiliser l’Application sur votre ou vos appareils personnels</text:p>
      <text:p text:style-name="Text_20_body">5.<text:span text:style-name="T8">3</text:span> Vous êtes seul responsable de l’ensemble du Contenu des Membres que vous mettez à disposition sur ou via la Plate-forme <text:span text:style-name="T8">Fishola</text:span>. Par conséquent, vous déclarez et garantissez que : (i) vous êtes soit le propriétaire unique et exclusif de l’ensemble du Contenu de Membres que vous mettez à disposition sur ou via la Plateforme <text:span text:style-name="T8">Fishola</text:span>, ; et (ii) ni le Contenu des Membres, ni votre publication, chargement, soumission ou transfert du Contenu des Membres, n’enfreindra, ne détournera ni ne violera aucun(e) brevet, droit d’auteur, marque commerciale, secret de fabrique, droits moraux ou autres droits exclusifs ou de propriété intellectuelle, ou droits de publicité ou de confidentialité de tiers, ni n’entraînera la violation de toute loi ou règlement applicable.</text:p>
      <text:p text:style-name="Text_20_body">5.<text:span text:style-name="T8">4</text:span> Vous vous interdisez de poster, charger, publier, soumettre ou transmettre tout Contenu de Membres qui : (i) est frauduleux, faux, trompeur (directement ou par omission ou manquement à mettre à jour des informations) ou mensonger ; (ii) est diffamatoire, calomnieux, obscène, pornographique, vulgaire ou choquant ; (iii) incite à la discrimination, au fanatisme, au racisme, à l’intolérance, à la haine, au harcèlement ou à causer un préjudice à l’encontre d’un individu ou d’un <text:soft-page-break/>groupe ; (iv) est violent ou menaçant ou fait la promotion de la violence ou d’actes menaçants à l’encontre de toute autre personne ou de tout animal ; (v) encourage les activités ou l’usage de substances illégales ou dangereuses. <text:span text:style-name="T8">Fishola </text:span>peut supprimer ou désactiver l’accès à tout Contenu des Membres qui est contraire au droit applicable, aux présentes Conditions, ou potentiellement nuisibles ou inacceptables pour <text:span text:style-name="T8">Fishola</text:span>, ses Membres, des tiers ou des biens. <text:span text:style-name="T8">Lorsque Fishola</text:span> supprime ou désactive du Contenu de Membres, <text:span text:style-name="T8">Fishola</text:span> informe le Membre et lui donne les raisons de cette décision sauf si cette notification (i) empêche ou gêne la découverte d'une fraude ou d'une autre activité illégale, (ii) nuit à l'intérêt légitime des autres Membres ou de tiers, ou (ii) enfreint le droit applicable. Vous pouvez faire appel de cette décision en contactant <text:span text:style-name="T8">les propriétaires de l’application.</text:span></text:p>
      <text:h text:style-name="Heading_20_4" text:outline-level="4"><text:span text:style-name="T10">5</text:span> Exclusions de responsabilité et de garantie</text:h>
      <text:p text:style-name="Text_20_body">Paragraphe volontairement laissé vierge.</text:p>
      <text:p text:style-name="Text_20_body"/>
      <text:h text:style-name="P1" text:outline-level="1">Charte de protection des données à caractère personnel</text:h>
      <text:p text:style-name="Text_20_body">Dernière mise à jour : 1<text:span text:style-name="T10">8 Mai</text:span> 20<text:span text:style-name="T10">20</text:span></text:p>
      <text:h text:style-name="Heading_20_4" text:outline-level="4"><text:bookmark text:name="sec201910_1"/>1. PRÉAMBULE</text:h>
      <text:p text:style-name="Text_20_body">Merci d’utiliser <text:span text:style-name="T10">Fishola</text:span> ! Votre confiance est importante pour nous, et nous nous engageons à protéger la confidentialité et la sécurité de vos données à caractère personnel. Les informations qui nous sont communiquées nous aident à <text:span text:style-name="T10">réaliser des études statistiques ou à visée scientifique</text:span>. Nous disposons d'une équipe dédiée à la protection des données à caractère personnel, qui veille à ce que toutes les données à caractère personnel que nous collectons soient protégées et traitées correctement.</text:p>
      <text:p text:style-name="P5">La présente Charte de protection des données à caractère personnel décrit la façon dont nous collectons, utilisons <text:span text:style-name="T10">et </text:span>traitons vos informations personnelles, en lien avec votre accès et votre utilisation de la Plateforme <text:span text:style-name="T10">Fishola</text:span>. La présente Charte de protection des données à caractère personnel décrit nos pratiques en matière de protection des données à caractère personnel sur tous les plateformes <text:span text:style-name="T10">et applications mobiles </text:span>qui renvoient à la présente Charte. </text:p>
      <text:p text:style-name="Text_20_body"><text:span text:style-name="Strong_20_Emphasis">1.1 DÉFINITIONS</text:span></text:p>
      <text:p text:style-name="Text_20_body">Si vous rencontrez un terme sans définition dans la présente Charte de protection des données à caractère personnel (comme « <text:span text:style-name="T10">Plateforme Fishola</text:span> »), ce terme aura la même définition que celle figurant dans <text:span text:style-name="T10">nos Conditions Générales d’Utilisation.</text:span></text:p>
      <text:p text:style-name="Text_20_body"><text:span text:style-name="Strong_20_Emphasis">1.2 RESPONSABLE DU TRAITEMENT</text:span></text:p>
      <text:p text:style-name="Text_20_body">Lorsque cette charte fait mention des termes « <text:span text:style-name="T10">Fishola</text:span> », « nous », « notre » ou « nos », elle fait référence à l’<text:span text:style-name="T10">UMR CARRTEL de l’INRAE</text:span>, laquelle est responsable des informations vous concernant, conformément à la présente Charte de protection des données à caractère personnel (le « Responsable du traitement »).</text:p>
      <text:p text:style-name="Text_20_body"/>
      <text:h text:style-name="Heading_20_4" text:outline-level="4"><text:bookmark text:name="sec201910_2"/>2. INFORMATIONS COLLECTÉES</text:h>
      <text:p text:style-name="Text_20_body">Nous demandons et recueillons les informations personnelles suivantes vous concernant lorsque vous utilisez la Plateforme <text:span text:style-name="T10">Fishola</text:span>. <text:span text:style-name="T10">Elles correspondent uniquement aux informations nécessaires à la bonne utilisation de l’application et à la pertinence des données de pêches récoltées afin de permettre leur traitement statistique.</text:span></text:p>
      <text:list xml:id="list522934239" text:style-name="L5">
        <text:list-item>
          <text:p text:style-name="P7">Informations de compte. Lors de la création de votre Compte Airbnb, nous vous demandons de nous communiquer certaines informations comme <text:span text:style-name="T10">adresse-email</text:span></text:p>
        </text:list-item>
        <text:list-item>
          <text:p text:style-name="P12">Informations sur vos prises lors de vos sessions de pêches (taille et poids des prises…)</text:p>
        </text:list-item>
        <text:list-item>
          <text:p text:style-name="P8"><text:span text:style-name="T10">Photographies de vos prises (optionnelles)</text:span></text:p>
        </text:list-item>
      </text:list>
      <text:list xml:id="list739118019" text:style-name="L8">
        <text:list-item>
          <text:p text:style-name="P9">Informations de géolocalisation. Lors de votre utilisation de certaines fonctionnalités de la Plateforme <text:span text:style-name="T10">Fishola</text:span>, nous pouvons collecter des informations sur votre emplacement approximatif ou précis, comme déterminé par des données telles que votre adresse IP ou par le GPS de votre appareil mobile, <text:span text:style-name="T10">uniquement afin d’obtenir une donnée complète.</text:span> La <text:soft-page-break/>majorité des appareils mobiles vous permet de contrôler ou désactiver l’utilisation des services de localisation dans les applications à partir du menu des paramètres de l’appareil. </text:p>
        </text:list-item>
        <text:list-item>
          <text:p text:style-name="P9">Informations d’utilisation. Nous recueillons des informations concernant vos interactions avec la Plateforme <text:span text:style-name="T11">Fishola</text:span>, comme vos consultations de pages ou de contenu</text:p>
        </text:list-item>
        <text:list-item>
          <text:p text:style-name="P9">Cookies et technologies similaires. Nous utilisons des cookies et d’autres technologies similaires lorsque vous utilisez notre plateforme <text:span text:style-name="T10">ou </text:span>notre application mobile. Nous pouvons collecter certaines informations par des moyens automatisés à l’aide de technologies comme les cookies, outils d’analyse de navigateur, fichiers de journalisation de serveur et identifiants d’équipement mobile. <text:span text:style-name="T11">Le</text:span>s informations que nous collectons à l’aide de cookies et d’autres outils sont utilisées uniquement sous forme anonyme, sans aucune référence à des données à caractère personnel. </text:p>
        </text:list-item>
        <text:list-item>
          <text:p text:style-name="P9">Signaux « Ne pas suivre » Même si vous avez la possibilité de désactiver les cookies à partir des paramètres de votre navigateur, la Plateforme Airbnb ne modifie pas ses pratiques en réponse à un signal « Ne pas suivre » dans l’entête HTTP de votre navigateur ou application mobile, en raison d’un manque de normalisation concernant la manière dont ce signal doit être interprété. </text:p>
        </text:list-item>
      </text:list>
      <text:p text:style-name="Text_20_body"/>
      <text:h text:style-name="Heading_20_4" text:outline-level="4"><text:bookmark text:name="sec201910_3"/>3. COMMENT UTILISONS-NOUS LES INFORMATIONS QUE NOUS COLLECTONS</text:h>
      <text:p text:style-name="Text_20_body">Nous pouvons utiliser, stocker et traiter des données à caractère personnel pour (1) alimenter, comprendre, améliorer et développer la Plateforme <text:span text:style-name="T11">Fishola</text:span>, (2) créer et maintenir un environnement de confiance et plus sécurisé (notamment pour nous conformer à nos obligations légales et veiller au respect des Politiques <text:span text:style-name="T11">de Fishola</text:span>) et (3) <text:span text:style-name="T11">analyser les données à des fins statistiques ou dans le cadre d’études scientifiques.</text:span></text:p>
      <text:p text:style-name="P6">Préciser ici si les données peuvent être divulgées à d’autres laboratoires que l’UMR CARRTEL, et le type d’études dans lesquelles ces données sont utilisées</text:p>
      <text:h text:style-name="Heading_20_4" text:outline-level="4"/>
      <text:h text:style-name="Heading_20_4" text:outline-level="4"><text:bookmark text:name="sec201910_6"/><text:span text:style-name="T12">4</text:span>. VOS DROITS</text:h>
      <text:p text:style-name="Text_20_body">En conformité avec la législation applicable, vous pouvez exercer tout droit décrit dans cette section auprès de votre Responsable du traitement. <text:span text:style-name="T12">V</text:span>ous trouverez ici de plus amples informations sur les droits des personnes concernées et sur la façon de soumettre une demande. Veuillez noter que nous pouvons vous demander de vérifier votre identité avant de prendre d’autres mesures concernant votre demande.</text:p>
      <text:p text:style-name="Text_20_body"><text:span text:style-name="Strong_20_Emphasis"><text:span text:style-name="T12">4.</text:span></text:span><text:span text:style-name="Strong_20_Emphasis">1 Gestion de vos informations.</text:span></text:p>
      <text:p text:style-name="Text_20_body">Vous pouvez accéder à et mettre à jour certaines de vos informations dans les paramètres de votre Compte.</text:p>
      <text:p text:style-name="Text_20_body"><text:span text:style-name="Strong_20_Emphasis"><text:span text:style-name="T7">4.</text:span></text:span><text:span text:style-name="Strong_20_Emphasis">3 Accès aux données et portabilité.</text:span></text:p>
      <text:p text:style-name="Text_20_body">Dans certaines juridictions, la loi applicable peut vous autoriser à demander certaines copies de vos informations personnelles que nous détenons. Vous pouvez également être autorisé à demander des copies des informations personnelles que vous nous avez fournies dans un format structuré, couramment utilisé et lisible à la machine et/ou nous demander de transmettre ces informations à un autre prestataire de services (lorsque cela est techniquement possible).</text:p>
      <text:p text:style-name="Text_20_body"><text:soft-page-break/><text:span text:style-name="Strong_20_Emphasis"><text:span text:style-name="T12">4.</text:span></text:span><text:span text:style-name="Strong_20_Emphasis">4 Conservation et suppression des données.</text:span></text:p>
      <text:p text:style-name="Text_20_body">En général, nous conservons vos informations personnelles aussi longtemps que nécessaire pour l’exécution de l’accord entre vous et nous. Dans certaines juridictions, vous pouvez nous demander de supprimer l’intégralité de vos informations personnell<text:span text:style-name="T12">es.</text:span></text:p>
      <text:p text:style-name="Text_20_body"><text:span text:style-name="Strong_20_Emphasis"/></text:p>
      <text:h text:style-name="Heading_20_4" text:outline-level="4"><text:span text:style-name="T12">5</text:span>. SÉCURITÉ</text:h>
      <text:p text:style-name="Text_20_body">Nous mettons en place et actualisons en permanence les mesures administratives, techniques et physiques en matière de sécurité pour protéger vos informations contre les accès, pertes, destructions ou altérations non autorisés. Certaines des mesures de protection que nous utilisons pour protéger vos informations sont des pare-feu et le cryptage des données, ainsi que des contrôles d’accès aux informations. Si vous savez ou avez des raisons de croire que vos informations d’identification de Compte <text:span text:style-name="T12">Fishola</text:span> ont été perdues, volées, détournées ou autrement compromises, ou en cas d’utilisation non autorisée réelle ou soupçonnée de votre Compte <text:span text:style-name="T12">Fishola</text:span>, veuillez nous contacter en suivant les instructions de la section « Contactez-nous » ci-dessous.</text:p>
      <text:h text:style-name="Heading_20_4" text:outline-level="4"><text:span text:style-name="T12">6</text:span>. MODIFICATIONS DE LA PRÉSENTE CHARTE DE PROTECTION DES DONNÉES À CARACTÈRE PERSONNEL</text:h>
      <text:p text:style-name="Text_20_body"><text:span text:style-name="T12">Fishola</text:span> se réserve le droit d’apporter toute modification à la présente Charte de protection des données à caractère personnel à tout moment, conformément à la présente disposition. Si nous apportons une modification à la présente Charte, nous publierons la nouvelle version de la Charte de protection des données à caractère personnel sur la Plateforme <text:span text:style-name="T12">Fishola</text:span> et actualiserons la date de « Dernière mise à jour » figurant en haut de la présente Charte. Nous vous informerons également de la modification par e-mail dans un délai minimum de trente (30) jours avant la date de sa prise d’effet. Si vous n’êtes pas d’accord avec les termes de la nouvelle Charte de protection des données à caractère personnel, vous pouvez supprimer votre Compte. Si vous ne supprimez pas votre Compte avant la date d’entrée en vigueur de la nouvelle Charte de protection des données à caractère personnel, votre accès et votre utilisation continus de la Plateforme Airbnb seront soumis à la nouvelle Charte de protection des données à caractère personnel.</text:p>
      <text:h text:style-name="Heading_20_4" text:outline-level="4"><text:bookmark text:name="sec201910_10"/><text:span text:style-name="T12">7</text:span>. CONTACTEZ-NOUS</text:h>
      <text:p text:style-name="Text_20_body">Si vous avez des questions ou des plaintes à formuler concernant la présente Charte de protection des données à caractère personnel ou les pratiques <text:span text:style-name="T12">de Fishola</text:span> en matière de traitement des informations, vous pouvez nous envoyer un e-mail aux adresses électroniques fournies dans les sections correspondantes ci-dessus, ou nous contacter par courrier à <text:s/>fishola-lutins@list.forge.codelutin.c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8T10:22:18.166446492</meta:creation-date>
    <dc:date>2020-05-18T11:03:59.844775407</dc:date>
    <meta:editing-duration>PT9M47S</meta:editing-duration>
    <meta:editing-cycles>2</meta:editing-cycles>
    <meta:generator>LibreOffice/6.4.2.2$Linux_X86_64 LibreOffice_project/40$Build-2</meta:generator>
    <meta:document-statistic meta:table-count="0" meta:image-count="0" meta:object-count="0" meta:page-count="6" meta:paragraph-count="63" meta:word-count="2343" meta:character-count="15412" meta:non-whitespace-character-count="13130"/>
  </office:meta>
</office:document-meta>
</file>