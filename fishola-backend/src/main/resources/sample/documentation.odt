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0CD000000705D296741143832C7.png" manifest:media-type="image/png"/>
  <manifest:file-entry manifest:full-path="Pictures/100011E40000152E00000B8D95CF29EE3C9C41F5.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1" draw:name="Image1" text:anchor-type="paragraph" svg:y="0.3cm" svg:width="5.422cm" svg:height="2.956cm" draw:z-index="0"><draw:image xlink:href="Pictures/100011E40000152E00000B8D95CF29EE3C9C41F5.svg" xlink:type="simple" xlink:show="embed" xlink:actuate="onLoad" loext:mime-type="image/svg+xml"/><draw:image xlink:href="Pictures/10000201000000CD000000705D296741143832C7.png" xlink:type="simple" xlink:show="embed" xlink:actuate="onLoad"/></draw:frame></text:p>
      <text:p text:style-name="Title">Exemple de documentation</text:p>
      <text:p text:style-name="Text_20_body"/>
      <text:p text:style-name="Text_20_body">Lorem ipsum dolor sit amet, consectetur adipiscing elit, sed do eiusmod tempor incididunt ut labore et dolore magna aliqua. Cursus euismod quis viverra nibh cras pulvinar. Tortor at auctor urna nunc id cursus metus aliquam eleifend. Consequat mauris nunc congue nisi vitae suscipit tellus. Neque convallis a cras semper auctor neque vitae tempus. Pellentesque sit amet porttitor eget dolor morbi non. Amet nisl suscipit adipiscing bibendum. Quis viverra nibh cras pulvinar mattis nunc sed blandit libero. Mus mauris vitae ultricies leo integer malesuada. Vestibulum lectus mauris ultrices eros in cursus. Ut sem viverra aliquet eget sit amet tellus cras. Dis parturient montes nascetur ridiculus mus mauris. Dolor sit amet consectetur adipiscing elit duis tristique sollicitudin nibh. Ultrices tincidunt arcu non sodales neque sodales ut. Auctor eu augue ut lectus arcu bibendum.</text:p>
      <text:section text:style-name="Sect1" text:name="output">
        <text:p text:style-name="Text_20_body">Facilisis sed odio morbi quis commodo. Enim tortor at auctor urna nunc id cursus. Ipsum dolor sit amet consectetur adipiscing. At ultrices mi tempus imperdiet. Eget lorem dolor sed viverra ipsum nunc aliquet bibendum. Nibh ipsum consequat nisl vel pretium lectus quam. Massa tincidunt dui ut ornare lectus sit amet est placerat. Donec enim diam vulputate ut pharetra. Tincidunt dui ut ornare lectus sit amet est placerat in. Auctor elit sed vulputate mi sit amet mauris commodo quis. Lectus magna fringilla urna porttitor rhoncus. Egestas sed tempus urna et pharetra pharetra massa. A lacus vestibulum sed arcu non odio. Varius sit amet mattis vulputate.</text:p>
        <text:p text:style-name="Text_20_body">At volutpat diam ut venenatis tellus in. Tortor posuere ac ut consequat semper viverra nam. In iaculis nunc sed augue lacus viverra vitae congue eu. At ultrices mi tempus imperdiet nulla malesuada pellentesque elit eget. Ut morbi tincidunt augue interdum velit euismod. Quisque non tellus orci ac auctor. Nibh sed pulvinar proin gravida hendrerit lectus a. Mollis aliquam ut porttitor leo a diam sollicitudin. Eu tincidunt tortor aliquam nulla. Nisl rhoncus mattis rhoncus urna neque viverra justo nec. Dictumst vestibulum rhoncus est pellentesque elit ullamcorper. Dictum varius duis at consectetur lorem donec massa. Maecenas volutpat blandit aliquam etiam erat velit scelerisque. Elit scelerisque mauris pellentesque pulvinar pellentesque. Eget nulla facilisi etiam dignissim diam quis enim. Sit amet cursus sit amet dictum.</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1T14:48:55.611800512</meta:creation-date>
    <dc:date>2020-03-31T14:53:35.450226927</dc:date>
    <meta:editing-duration>PT4M41S</meta:editing-duration>
    <meta:editing-cycles>1</meta:editing-cycles>
    <meta:document-statistic meta:table-count="0" meta:image-count="1" meta:object-count="0" meta:page-count="1" meta:paragraph-count="4" meta:word-count="359" meta:character-count="2384" meta:non-whitespace-character-count="2029"/>
    <meta:generator>LibreOffice/6.0.7.3$Linux_X86_64 LibreOffice_project/00m0$Build-3</meta:generator>
  </office:meta>
</office:document-meta>
</file>